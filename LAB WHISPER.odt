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Standard" style:master-page-name="MP0" style:family="paragraph">
      <style:paragraph-properties fo:break-before="page"/>
      <style:text-properties fo:font-weight="bold" style:font-weight-asian="bold" style:font-weight-complex="bold"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T4" style:parent-style-name="Absatz-Standardschriftart" style:family="text">
      <style:text-properties fo:language="en" fo:country="US"/>
    </style:style>
    <style:style style:name="T5" style:parent-style-name="Absatz-Standardschriftart" style:family="text">
      <style:text-properties fo:font-style="italic" style:font-style-asian="italic" style:font-style-complex="italic" fo:language="en" fo:country="US"/>
    </style:style>
    <style:style style:name="T6" style:parent-style-name="Absatz-Standardschriftart" style:family="text">
      <style:text-properties fo:language="en" fo:country="US"/>
    </style:style>
    <style:style style:name="T7" style:parent-style-name="Absatz-Standardschriftart" style:family="text">
      <style:text-properties fo:font-weight="bold" style:font-weight-asian="bold" style:font-weight-complex="bold" fo:language="en" fo:country="US"/>
    </style:style>
    <style:style style:name="T8" style:parent-style-name="Absatz-Standardschriftart" style:family="text">
      <style:text-properties fo:language="en" fo:country="US"/>
    </style:style>
    <style:style style:name="T9" style:parent-style-name="Absatz-Standardschriftart" style:family="text">
      <style:text-properties fo:font-weight="bold" style:font-weight-asian="bold" style:font-weight-complex="bold" fo:language="en" fo:country="US"/>
    </style:style>
    <style:style style:name="T10" style:parent-style-name="Absatz-Standardschriftart" style:family="text">
      <style:text-properties fo:language="en" fo:country="US"/>
    </style:style>
    <style:style style:name="T11" style:parent-style-name="Absatz-Standardschriftart" style:family="text">
      <style:text-properties fo:font-weight="bold" style:font-weight-asian="bold" style:font-weight-complex="bold" fo:language="en" fo:country="US"/>
    </style:style>
    <style:style style:name="T12" style:parent-style-name="Absatz-Standardschriftart" style:family="text">
      <style:text-properties fo:language="en" fo:country="US"/>
    </style:style>
    <style:style style:name="T13" style:parent-style-name="Absatz-Standardschriftart" style:family="text">
      <style:text-properties fo:font-weight="bold" style:font-weight-asian="bold" style:font-weight-complex="bold" fo:language="en" fo:country="US"/>
    </style:style>
    <style:style style:name="T14" style:parent-style-name="Absatz-Standardschriftart" style:family="text">
      <style:text-properties fo:language="en" fo:country="US"/>
    </style:style>
    <style:style style:name="T15" style:parent-style-name="Absatz-Standardschriftart" style:family="text">
      <style:text-properties fo:font-weight="bold" style:font-weight-asian="bold" style:font-weight-complex="bold" fo:language="en" fo:country="US"/>
    </style:style>
    <style:style style:name="T16" style:parent-style-name="Absatz-Standardschriftart" style:family="text">
      <style:text-properties fo:language="en" fo:country="US"/>
    </style:style>
    <style:style style:name="T17" style:parent-style-name="Absatz-Standardschriftart" style:family="text">
      <style:text-properties fo:font-weight="bold" style:font-weight-asian="bold" style:font-weight-complex="bold" fo:language="en" fo:country="US"/>
    </style:style>
    <style:style style:name="T18" style:parent-style-name="Absatz-Standardschriftart" style:family="text">
      <style:text-properties fo:language="en" fo:country="US"/>
    </style:style>
    <style:style style:name="T19" style:parent-style-name="Absatz-Standardschriftart" style:family="text">
      <style:text-properties fo:font-weight="bold" style:font-weight-asian="bold" style:font-weight-complex="bold" fo:language="en" fo:country="US"/>
    </style:style>
    <style:style style:name="T20" style:parent-style-name="Absatz-Standardschriftart" style:family="text">
      <style:text-properties fo:language="en" fo:country="US"/>
    </style:style>
    <style:style style:name="P21" style:parent-style-name="Standard" style:family="paragraph">
      <style:text-properties fo:font-weight="bold" style:font-weight-asian="bold" style:font-weight-complex="bold" fo:language="en" fo:country="US"/>
    </style:style>
    <style:style style:name="P22" style:parent-style-name="Standard" style:family="paragraph">
      <style:text-properties fo:language="en" fo:country="US"/>
    </style:style>
    <style:style style:name="P23" style:parent-style-name="Standard" style:family="paragraph">
      <style:text-properties fo:font-weight="bold" style:font-weight-asian="bold" style:font-weight-complex="bold" fo:language="en" fo:country="US"/>
    </style:style>
    <style:style style:name="P24" style:parent-style-name="Standard" style:family="paragraph">
      <style:text-properties fo:language="en" fo:country="US"/>
    </style:style>
    <style:style style:name="P25" style:parent-style-name="Standard" style:family="paragraph">
      <style:text-properties fo:font-weight="bold" style:font-weight-asian="bold" style:font-weight-complex="bold" fo:language="en" fo:country="US"/>
    </style:style>
    <style:style style:name="P26" style:parent-style-name="Standard" style:family="paragraph">
      <style:text-properties fo:language="en" fo:country="US"/>
    </style:style>
    <style:style style:name="P27" style:parent-style-name="Standard" style:family="paragraph">
      <style:text-properties fo:language="en" fo:country="US"/>
    </style:style>
  </office:automatic-styles>
  <office:body>
    <office:text text:use-soft-page-breaks="true">
      <text:p text:style-name="P1">LAB<text:s/>WHISPER</text:p>
      <text:p text:style-name="P2"/>
      <text:p text:style-name="P3">To evaluate the Whisper API, I compared a guided (prompted) transcription with an unguided (unprompted) transcription using the same Hawaiian audio recording.</text:p>
      <text:p text:style-name="Standard"><text:span text:style-name="T4">Both versions successfully transcribed the conversation about the traditional Hawaiian fishing practice known as<text:s/></text:span><text:span text:style-name="T5">hukilau</text:span><text:span text:style-name="T6">. However, the guided transcription produced slightly more accurate results for specialized vocabulary and culturally specific terms. For example, it correctly recognized<text:s/></text:span><text:span text:style-name="T7">lead</text:span><text:span text:style-name="T8"><text:s/>as the weight attached to the fishing net and identified the fish species<text:s/></text:span><text:span text:style-name="T9">akule</text:span><text:span text:style-name="T10">. In comparison, the unguided transcription interpreted<text:s/></text:span><text:span text:style-name="T11">lead</text:span><text:span text:style-name="T12"><text:s/>as<text:s/></text:span><text:span text:style-name="T13">lay down</text:span><text:span text:style-name="T14"><text:s/>or<text:s/></text:span><text:span text:style-name="T15">leaf</text:span><text:span text:style-name="T16">, and<text:s/></text:span><text:span text:style-name="T17">akule</text:span><text:span text:style-name="T18"><text:s/>as<text:s/></text:span><text:span text:style-name="T19">aku</text:span><text:span text:style-name="T20">. Although both transcripts conveyed the overall meaning, the prompted transcription was more accurate and required fewer corrections.</text:span></text:p>
      <text:p text:style-name="P21">Benefits of Chunking for Long Audio</text:p>
      <text:p text:style-name="P22">Chunking is an important technique for processing long audio recordings because it divides large files into smaller, manageable segments before transcription. This helps overcome API file-size limitations, reduces memory usage, and improves processing reliability. If an error occurs during transcription, only the affected chunk needs to be processed again rather than the entire recording. Chunking also makes it easier to process very long recordings such as meetings, interviews, or lectures while maintaining an organized workflow.</text:p>
      <text:p text:style-name="P23">Challenges Faced</text:p>
      <text:p text:style-name="P24">The main challenges during this lab involved configuring the development environment. Installing FFmpeg on Windows required downloading the correct Windows release instead of the source code and adding it to the system PATH so that Python could access it. Another challenge was securely configuring the OpenAI API key. This was solved by storing the key in a .env file and loading it with the python-dotenv package instead of hardcoding the key in the notebook. Additional troubleshooting was required to install the necessary Python packages and ensure that the audio files were stored in the correct project directory before transcription could be completed successfully.</text:p>
      <text:p text:style-name="P25">Recommendations for Improving Accuracy</text:p>
      <text:p text:style-name="P26">Several approaches can improve transcription accuracy. Providing prompts with relevant technical terms, names, or contextual information helps the model recognize specialized vocabulary more accurately. Recording high-quality audio with minimal background noise also improves results. Long recordings should be processed using chunking to improve efficiency and reduce the likelihood of errors. Finally, API keys should always be stored securely using environment variables rather than directly in the source code.</text:p>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style:font-name-complex="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lza Paegle</meta:initial-creator>
    <dc:creator>Elza Paegle</dc:creator>
    <meta:creation-date>2026-07-14T09:35:00Z</meta:creation-date>
    <dc:date>2026-07-14T09:36:00Z</dc:date>
    <meta:template xlink:href="Normal" xlink:type="simple"/>
    <meta:editing-cycles>1</meta:editing-cycles>
    <meta:editing-duration>PT0S</meta:editing-duration>
    <meta:user-defined meta:name="GrammarlyDocumentId">b36490a0-fa4a-4729-afe7-e2d76c757434</meta:user-defined>
    <meta:document-statistic meta:page-count="2" meta:paragraph-count="5" meta:word-count="356" meta:character-count="2594" meta:row-count="18" meta:non-whitespace-character-count="2243"/>
  </office:meta>
</office:document-meta>
</file>